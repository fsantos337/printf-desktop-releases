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847cm" fo:margin-bottom="0cm" style:contextual-spacing="false" fo:line-height="115%" fo:text-align="center" style:justify-single-word="false" style:writing-mode="lr-tb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loext:opacity="100%" fo:font-family="Arial" style:font-family-generic="roman" style:font-pitch="variable" fo:font-size="16pt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Evidências de Teste</text:span></text:h>
      <text:p text:style-name="P2"/>
      <text:p text:style-name="P2">As evidências de teste contidas neste arquivo servem para documentar o comportamento do sistema durante a validação. Elas comprovam que os critérios de aceite foram testados e fornecem o suporte necessário para a homologação da funcionalidade ou correção de bug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07:49:19.921446300</meta:creation-date>
    <dc:date>2026-04-20T07:49:25.991083100</dc:date>
    <meta:editing-duration>PT6S</meta:editing-duration>
    <meta:editing-cycles>1</meta:editing-cycles>
    <meta:document-statistic meta:table-count="0" meta:image-count="0" meta:object-count="0" meta:page-count="1" meta:paragraph-count="2" meta:word-count="43" meta:character-count="282" meta:non-whitespace-character-count="241"/>
    <meta:generator>LibreOffice/26.2.1.2$Windows_X86_64 LibreOffice_project/620$Build-2</meta:generator>
  </office:meta>
</office:document-meta>
</file>